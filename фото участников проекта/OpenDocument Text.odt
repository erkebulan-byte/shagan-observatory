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ldaSans" svg:font-family="TildaSans, Arial, sans-serif"/>
  </office:font-face-decls>
  <office:automatic-styles>
    <style:style style:name="Таблица1" style:family="table">
      <style:table-properties style:width="7.3125in" fo:margin-left="0in" table:align="left"/>
    </style:style>
    <style:style style:name="Таблица1.A" style:family="table-column">
      <style:table-column-properties style:column-width="1.625in"/>
    </style:style>
    <style:style style:name="Таблица1.B" style:family="table-column">
      <style:table-column-properties style:column-width="1.8125in"/>
    </style:style>
    <style:style style:name="Таблица1.C" style:family="table-column">
      <style:table-column-properties style:column-width="3.875in"/>
    </style:style>
    <style:style style:name="Таблица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officeooo:paragraph-rsid="0021cde9" style:font-size-asian="7pt" style:font-size-complex="7pt"/>
    </style:style>
    <style:style style:name="P2" style:family="paragraph" style:parent-style-name="Standard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 officeooo:paragraph-rsid="001d7de0"/>
    </style:style>
    <style:style style:name="P3" style:family="paragraph" style:parent-style-name="Standard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style:font-size-asian="7pt" style:font-size-complex="7pt"/>
    </style:style>
    <style:style style:name="P4" style:family="paragraph" style:parent-style-name="Standard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TildaSans" fo:font-size="7pt" fo:font-weight="bold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TildaSans" fo:font-size="7pt" fo:font-weight="bold" officeooo:paragraph-rsid="00219b87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55%" fo:text-indent="0in" style:auto-text-indent="false"/>
      <style:text-properties fo:color="#000000" loext:opacity="100%" style:font-name="TildaSans" fo:font-size="7pt" fo:font-weight="normal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.2917in" style:contextual-spacing="false" fo:line-height="155%" fo:text-indent="0in" style:auto-text-indent="false"/>
      <style:text-properties fo:color="#666666" loext:opacity="100%" style:font-name="TildaSans" fo:font-size="7pt" fo:font-weight="normal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.0972in" style:contextual-spacing="false" fo:line-height="114%" fo:text-indent="0in" style:auto-text-indent="false"/>
      <style:text-properties fo:color="#666666" loext:opacity="100%" style:font-name="TildaSans" fo:font-size="7pt" fo:font-weight="normal" officeooo:paragraph-rsid="0021cde9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.0972in" style:contextual-spacing="false" fo:line-height="114%" fo:text-indent="0in" style:auto-text-indent="false"/>
      <style:text-properties fo:color="#666666" loext:opacity="100%" style:font-name="TildaSans" fo:font-size="7pt" fo:font-weight="normal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5%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219b87"/>
    </style:style>
    <style:style style:name="P1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21cde9"/>
    </style:style>
    <style:style style:name="P1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 officeooo:paragraph-rsid="001d7de0"/>
    </style:style>
    <style:style style:name="P1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style:font-size-asian="7pt" style:font-size-complex="7pt"/>
    </style:style>
    <style:style style:name="P1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officeooo:paragraph-rsid="0021cde9" style:font-size-asian="7pt" style:font-size-complex="7pt"/>
    </style:style>
    <style:style style:name="P1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officeooo:paragraph-rsid="001f596f"/>
    </style:style>
    <style:style style:name="P1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fo:font-weight="bold" officeooo:paragraph-rsid="001d7de0" style:font-size-asian="7pt" style:font-size-complex="7pt"/>
    </style:style>
    <style:style style:name="P2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fo:font-weight="bold" officeooo:paragraph-rsid="00219b87" style:font-size-asian="7pt" style:font-size-complex="7pt"/>
    </style:style>
    <style:style style:name="P21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font-size="7pt" style:font-size-asian="7pt" style:font-size-complex="7pt"/>
    </style:style>
    <style:style style:name="P2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7pt" officeooo:paragraph-rsid="00219b87" style:font-size-asian="7pt" style:font-size-complex="7pt"/>
    </style:style>
    <style:style style:name="P23" style:family="paragraph" style:parent-style-name="Text_20_body">
      <style:text-properties fo:font-size="7pt" style:font-size-asian="7pt" style:font-size-complex="7p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size="7pt" style:font-size-asian="7pt" style:font-size-complex="7pt"/>
    </style:style>
    <style:style style:name="T3" style:family="text">
      <style:text-properties style:font-name="Google Sans Text" fo:font-size="7pt" fo:font-weight="bold" style:font-size-asian="7pt" style:font-size-complex="7pt"/>
    </style:style>
    <style:style style:name="T4" style:family="text">
      <style:text-properties style:font-name="Google Sans Text" fo:font-size="6pt" style:font-size-asian="6pt" style:font-size-complex="6pt"/>
    </style:style>
    <style:style style:name="T5" style:family="text">
      <style:text-properties fo:font-variant="normal" fo:text-transform="none" fo:color="#000000" loext:opacity="100%" style:font-name="TildaSans" fo:font-size="19.5pt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TildaSans" fo:letter-spacing="normal" fo:font-style="normal" fo:font-weight="bold"/>
    </style:style>
    <style:style style:name="T7" style:family="text">
      <style:text-properties fo:font-variant="normal" fo:text-transform="none" fo:color="#000000" loext:opacity="100%" style:font-name="TildaSans" fo:letter-spacing="normal" fo:font-style="normal" fo:font-weight="bold" style:font-size-asian="7pt" style:font-size-complex="7pt"/>
    </style:style>
    <style:style style:name="T8" style:family="text">
      <style:text-properties fo:font-variant="normal" fo:text-transform="none" fo:color="#000000" loext:opacity="100%" style:font-name="TildaSans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TildaSans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loext:opacity="100%" style:font-name="TildaSans" fo:font-size="10.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TildaSans" fo:font-size="10.5pt" fo:letter-spacing="normal" fo:font-style="normal" fo:font-weight="normal" style:font-size-asian="7pt" style:font-size-complex="7pt"/>
    </style:style>
    <style:style style:name="T12" style:family="text">
      <style:text-properties fo:font-variant="normal" fo:text-transform="none" fo:color="#000000" loext:opacity="100%" style:font-name="TildaSans" fo:font-size="10.5pt" fo:letter-spacing="normal" fo:font-style="normal" fo:font-weight="bold"/>
    </style:style>
    <style:style style:name="T13" style:family="text">
      <style:text-properties fo:font-variant="normal" fo:text-transform="none" fo:color="#000000" loext:opacity="100%" style:font-name="TildaSans" fo:font-size="7pt" fo:letter-spacing="normal" fo:font-style="normal" fo:font-weight="normal" style:font-size-asian="7pt" style:font-size-complex="7pt"/>
    </style:style>
    <style:style style:name="T14" style:family="text">
      <style:text-properties fo:font-variant="normal" fo:text-transform="none" fo:color="#000000" loext:opacity="100%" style:font-name="TildaSans" fo:font-size="7pt" fo:letter-spacing="normal" fo:font-style="normal" fo:font-weight="normal" style:font-size-asian="7pt" style:font-size-complex="7pt" loext:padding="0in" loext:border="none"/>
    </style:style>
    <style:style style:name="T15" style:family="text">
      <style:text-properties fo:font-variant="normal" fo:text-transform="none" fo:color="#000000" loext:opacity="100%" style:font-name="TildaSans" fo:font-size="7pt" fo:letter-spacing="normal" fo:font-style="normal" fo:font-weight="bold" style:font-size-asian="7pt" style:font-size-complex="7pt"/>
    </style:style>
    <style:style style:name="T16" style:family="text">
      <style:text-properties fo:font-variant="normal" fo:text-transform="none" fo:color="#000000" loext:opacity="100%" style:font-name="TildaSans" fo:font-size="6pt" fo:letter-spacing="normal" fo:font-style="normal" fo:font-weight="normal" style:font-size-asian="6pt" style:font-size-complex="6pt"/>
    </style:style>
    <style:style style:name="T17" style:family="text">
      <style:text-properties fo:font-variant="normal" fo:text-transform="none" fo:color="#666666" loext:opacity="100%" style:font-name="TildaSans" fo:font-size="12pt" fo:letter-spacing="normal" fo:font-style="normal" fo:font-weight="normal"/>
    </style:style>
    <style:style style:name="T18" style:family="text">
      <style:text-properties fo:font-variant="normal" fo:text-transform="none" fo:color="#666666" loext:opacity="100%" style:font-name="TildaSans" fo:font-size="12pt" fo:letter-spacing="normal" fo:font-style="normal" fo:font-weight="normal" style:font-size-asian="7pt" style:font-size-complex="7pt"/>
    </style:style>
    <style:style style:name="T19" style:family="text">
      <style:text-properties fo:font-variant="normal" fo:text-transform="none" fo:color="#666666" loext:opacity="100%" style:font-name="TildaSans" fo:letter-spacing="normal" fo:font-style="normal" fo:font-weight="normal"/>
    </style:style>
    <style:style style:name="T20" style:family="text">
      <style:text-properties fo:color="#000000" loext:opacity="100%" style:font-name="TildaSans" fo:font-weight="bold" style:font-size-asian="7pt" style:font-size-complex="7pt" loext:padding="0in" loext:border="none"/>
    </style:style>
    <style:style style:name="T21" style:family="text">
      <style:text-properties fo:color="#000000" loext:opacity="100%" style:font-name="TildaSans" fo:font-weight="bold" loext:padding="0in" loext:border="none"/>
    </style:style>
    <style:style style:name="T22" style:family="text">
      <style:text-properties fo:color="#000000" loext:opacity="100%" style:font-name="TildaSans" fo:font-size="10.5pt" fo:font-weight="normal" loext:padding="0in" loext:border="none"/>
    </style:style>
    <style:style style:name="T23" style:family="text">
      <style:text-properties fo:color="#000000" loext:opacity="100%" style:font-name="TildaSans" fo:font-size="10.5pt" fo:font-weight="bold" loext:padding="0in" loext:border="none"/>
    </style:style>
    <style:style style:name="T24" style:family="text">
      <style:text-properties fo:color="#000000" loext:opacity="100%" style:font-name="TildaSans" fo:font-size="7pt" fo:font-weight="normal" style:font-size-asian="7pt" style:font-size-complex="7pt" loext:padding="0in" loext:border="none"/>
    </style:style>
    <style:style style:name="T25" style:family="text">
      <style:text-properties fo:color="#000000" loext:opacity="100%" style:font-name="TildaSans" fo:font-size="7pt" fo:font-weight="bold" style:font-size-asian="7pt" style:font-size-complex="7pt" loext:padding="0in" loext:border="none"/>
    </style:style>
    <style:style style:name="T26" style:family="text">
      <style:text-properties fo:color="#000000" loext:opacity="100%" style:font-name="TildaSans" fo:font-size="13.5pt" fo:font-weight="normal" loext:padding="0in" loext:border="none"/>
    </style:style>
    <style:style style:name="T27" style:family="text">
      <style:text-properties fo:color="#000000" loext:opacity="100%" style:font-name="TildaSans" fo:font-weight="normal" loext:padding="0in" loext:border="none"/>
    </style:style>
    <style:style style:name="T28" style:family="text">
      <style:text-properties style:font-size-asian="7pt" style:font-size-complex="7pt"/>
    </style:style>
    <style:style style:name="T29" style:family="text">
      <style:text-properties fo:font-size="7pt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666666" loext:opacity="100%" style:font-name="TildaSans" fo:font-size="7pt" fo:font-weight="normal" style:font-size-asian="7pt" style:font-size-complex="7pt" loext:padding="0in" loext:border="none"/>
    </style:style>
    <style:style style:name="T32" style:family="text">
      <style:text-properties fo:color="#666666" loext:opacity="100%" style:font-name="TildaSans" fo:font-weight="normal" loext:padding="0in" loext:border="none"/>
    </style:style>
    <style:style style:name="T33" style:family="text">
      <style:text-properties fo:color="#666666" loext:opacity="100%" style:font-name="TildaSans" fo:font-size="12pt" fo:font-weight="normal" style:font-size-asian="7pt" style:font-size-complex="7pt" loext:padding="0in" loext:border="none"/>
    </style:style>
    <style:style style:name="T34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2"><text:span text:style-name="Strong_20_Emphasis"><text:span text:style-name="T1">Карточка</text:span></text:span></text:p>
            </table:table-cell>
            <table:table-cell table:style-name="Таблица1.A1" office:value-type="string">
              <text:p text:style-name="P12"><text:span text:style-name="Strong_20_Emphasis"><text:span text:style-name="T1">Назначенная роль</text:span></text:span></text:p>
            </table:table-cell>
            <table:table-cell table:style-name="Таблица1.A1" office:value-type="string">
              <text:p text:style-name="P12"><text:span text:style-name="Strong_20_Emphasis"><text:span text:style-name="T1">Подробнее</text:span></text:span></text:p>
            </table:table-cell>
          </table:table-row>
        </table:table-header-rows>
        <table:table-row>
          <table:table-cell table:style-name="Таблица1.A1" office:value-type="string">
            <text:p text:style-name="P15">1 . <text:span text:style-name="Source_20_Text"><text:span text:style-name="T1">member2.png</text:span></text:span> </text:p>
          </table:table-cell>
          <table:table-cell table:style-name="Таблица1.A1" office:value-type="string">
            <text:p text:style-name="P18"><text:span text:style-name="T7">Байгазинов Жанат Абылканович.</text:span><text:span text:style-name="T28"> <text:s text:c="20"/></text:span></text:p>
            <text:p text:style-name="P18"><text:span text:style-name="T20">Кандидат биологических наук</text:span></text:p>
            <text:p text:style-name="P7"/>
            <text:p text:style-name="P15"><text:span text:style-name="Strong_20_Emphasis"><text:span text:style-name="T13">Научный руководитель</text:span></text:span><text:span text:style-name="T30"><text:line-break/></text:span><text:span text:style-name="T13">Руководитель проекта, Общее руководство работ, постановка задачи, координация экспериментальных работ, аналитических исследований, подготовка отчета, статьей</text:span><text:span text:style-name="T30"> </text:span></text:p>
          </table:table-cell>
          <table:table-cell table:style-name="Таблица1.A1" office:value-type="string">
            <text:p text:style-name="P15"><text:span text:style-name="T13">Байгазинов Ж.А. обладает 17-летним опытом работы в области обеспечения радиационной безопасности, из которых 15 лет он провел в Институте радиационной безопасности и экологии НЯЦ РК. Участвовал в радиоэкологических, радиобиологических, цитогенетических и эпидемиологических исследованиях, выступая как ответственный исполнитель и научный руководитель работ по государственным научно-техническим программам и международным проектам (проекты Европейского Радиоэкологического Альянса, Европейской Комиссии, МНТЦ; MEXT Японии). За свой вклад в развитие атомной энергии Казахстана был удостоен почетной грамоты Министерства энергетики РК и медали "Лучший преподаватель вуза" Министерства образования и науки РК. Байгазинов Ж.А. является автором и соавтором более 50 статей, тезисов и научных работ в области радиобиологии и радиоэкологии, включая около 20 научных публикаций (статей, докладов, отчетов), выполненных совместно с учеными из Великобритании, Испании, России, Италии, Венгрии, Японии и Казахстана.</text:span><text:span text:style-name="T30"><text:line-break/><text:line-break/></text:span><text:span text:style-name="T31">Alikhan Bokeikhan University, заведующий кафедрой</text:span></text:p>
          </table:table-cell>
        </table:table-row>
        <table:table-row>
          <table:table-cell table:style-name="Таблица1.A1" office:value-type="string">
            <text:p text:style-name="P15">2. <text:span text:style-name="Source_20_Text"><text:span text:style-name="T1">member3.png</text:span></text:span> </text:p>
          </table:table-cell>
          <table:table-cell table:style-name="Таблица1.A1" office:value-type="string">
            <text:p text:style-name="P5">Мухамедияров Нурлан Жумагазыевич. </text:p>
            <text:p text:style-name="P5">Магистр химии</text:p>
            <text:p text:style-name="P7"/>
            <text:p text:style-name="P3"><text:span text:style-name="Strong_20_Emphasis"><text:span text:style-name="T8">Роль в проекте</text:span></text:span><text:line-break/><text:span text:style-name="T8">Обеспечение надлежащего контроля за качеством измерений, оформление соответствующей отчетной документации и написание научных статей.</text:span> </text:p>
          </table:table-cell>
          <table:table-cell table:style-name="Таблица1.A1" office:value-type="string">
            <text:p text:style-name="P20"><text:span text:style-name="T8">Мухамедияров Н.Ж. обладает 15-летним опытом в сфере исследования миграции тяжелых металлов и радионуклидов в основных компонентах экосистемы СИП. Он руководил лабораторией элементного анализа, где проводились исследования с использованием методов масс- и атомно-эмиссионной спектрометрии с индуктивно связанной плазмой. Автор более 20 научных статей по данному направлению исследования, он также прошел обучающие курсы и стажировки в рамках программ МАГАТЭ (Юлих, Германия) и ЦИПК "РОСАТОМ".</text:span> </text:p>
            <text:p text:style-name="P20"><text:span text:style-name="T32"/></text:p>
            <text:p text:style-name="P20"><text:span text:style-name="T32">НАО "Университет имени Шакарима Города Семей", научный сотрудник</text:span></text:p>
          </table:table-cell>
        </table:table-row>
        <table:table-row>
          <table:table-cell table:style-name="Таблица1.A1" office:value-type="string">
            <text:p text:style-name="P15">3. <text:span text:style-name="Source_20_Text"><text:span text:style-name="T1">member9.png</text:span></text:span> </text:p>
          </table:table-cell>
          <table:table-cell table:style-name="Таблица1.A1" office:value-type="string">
            <text:p text:style-name="P22"><text:span text:style-name="Strong_20_Emphasis">Тұрғалиева Динара Тұрғалиқызы,</text:span><text:line-break/></text:p>
            <text:p text:style-name="P22"><text:span text:style-name="Strong_20_Emphasis">Магистр биотехнологии</text:span>.</text:p>
            <text:p text:style-name="P16"><text:span text:style-name="Strong_20_Emphasis"><text:span text:style-name="T8">Роль в проекте</text:span></text:span><text:line-break/><text:span text:style-name="T8">Исполнитель.</text:span><text:line-break/><text:span text:style-name="T8">Организация лабораторных работ по подготовке проб воды, растений, воздуха и животноводческой продукции к спектрометрическим анализам. Обеспечение контроля качества измерений.</text:span> </text:p>
          </table:table-cell>
          <table:table-cell table:style-name="Таблица1.A1" office:value-type="string">
            <text:p text:style-name="P19"><text:span text:style-name="T10">Т</text:span><text:span text:style-name="T8">ұрғалиева Д.Т. обладает 3-летним опытом работы в области аналитической химии, специализируясь на подготовке проб окружающей среды к элементному и радионуклидному анализу.</text:span> </text:p>
            <text:p text:style-name="P19"><text:span text:style-name="T19">Alikhan Bokeikhan University, преподаватель</text:span> </text:p>
          </table:table-cell>
        </table:table-row>
        <table:table-row>
          <table:table-cell table:style-name="Таблица1.A1" office:value-type="string">
            <text:p text:style-name="P15">4. <text:span text:style-name="Source_20_Text"><text:span text:style-name="T1">member7.png</text:span></text:span> </text:p>
          </table:table-cell>
          <table:table-cell table:style-name="Таблица1.A1" office:value-type="string">
            <text:p text:style-name="P17"><text:span text:style-name="T6">Актаев Медет Рыскалиевич.</text:span><text:line-break/></text:p>
            <text:p text:style-name="P17"><text:span text:style-name="T6">Докторант</text:span> </text:p>
            <text:p text:style-name="P16"><text:span text:style-name="Strong_20_Emphasis"><text:span text:style-name="T8">Роль в проекте</text:span></text:span><text:line-break/><text:span text:style-name="T8">Исполнитель.</text:span><text:line-break/><text:span text:style-name="T8">Организация полевых работ по изучению гидрологического режима малых рек и отбору проб воды, растений для определения концентрации загрязняющих веществ. Подготовка отчетных материалов и публикаций.</text:span> </text:p>
          </table:table-cell>
          <table:table-cell table:style-name="Таблица1.A1" office:value-type="string">
            <text:p text:style-name="P2"><text:span text:style-name="Source_20_Text"><text:span text:style-name="T31"/></text:span></text:p>
            <text:p text:style-name="P6">Актаев М.Р. обладает 15-летним стажем в области мониторинга радиационного загрязнения окружающей среды и в настоящее время является докторантом PhD. Его научная работа фокусируется на исследовании экологических характеристик поверхностных и подземных вод, выявлении источников загрязнения и механизмов миграции загрязняющих веществ в водной среде. Актаев М.Р. был ответственным исполнителем научно-исследовательской работы, проведенной в рамках финансирования Министерства образования и науки Республики Казахстан, под названием "Оценка экологического состояния реки Иртыш". Кроме того, он прошел обучение на различных курсах и вебинарах, организованных МАГАТЭ и в Казахстане.</text:p>
            <text:p text:style-name="P2"><text:span text:style-name="Source_20_Text"><text:span text:style-name="T31">Евразийский национальный университет им. Л.Н. Гумилева, PhD докторант кафедры управления и инжиниринга в сфере охраны окружающей среды</text:span></text:span></text:p>
          </table:table-cell>
        </table:table-row>
        <text:soft-page-break/>
        <table:table-row>
          <table:table-cell table:style-name="Таблица1.A1" office:value-type="string">
            <text:p text:style-name="P15">5. <text:span text:style-name="Source_20_Text"><text:span text:style-name="T1">member5.png </text:span></text:span></text:p>
          </table:table-cell>
          <table:table-cell table:style-name="Таблица1.A1" office:value-type="string">
            <text:p text:style-name="P14"><text:span text:style-name="T15">Мухамедиярова Алмагуль. Айдомбековна, </text:span></text:p>
            <text:p text:style-name="P14"><text:span text:style-name="T15">бакалавр химии</text:span><text:span text:style-name="T2"> <text:s/></text:span></text:p>
            <text:p text:style-name="P13"><text:span text:style-name="T2"><text:s/></text:span><text:span text:style-name="Strong_20_Emphasis"><text:span text:style-name="T13">Роль в проекте</text:span></text:span><text:span text:style-name="T30"><text:line-break/></text:span><text:span text:style-name="T13">Исполнитель.</text:span><text:span text:style-name="T30"><text:line-break/></text:span><text:span text:style-name="T13">Организация проведения лабораторных исследований, подготовка проб воды, растений, воздуха и продукции животноводства для проведения спектрометрических анализов. Осуществление контроля за качеством измерений.</text:span><text:span text:style-name="T30"> </text:span></text:p>
          </table:table-cell>
          <table:table-cell table:style-name="Таблица1.A1" office:value-type="string">
            <text:p text:style-name="P15"><text:span text:style-name="Source_20_Text"><text:span text:style-name="T13">Мухамедиярова А.А. обладает 10-летним опытом в области аналитической химии, специализируется на подготовке проб окружающей среды к элементному и радионуклидному анализу.</text:span></text:span><text:span text:style-name="Source_20_Text"><text:span text:style-name="T2"><text:line-break/></text:span></text:span></text:p>
            <text:p text:style-name="P2"><text:span text:style-name="Source_20_Text"><text:span text:style-name="T31">«Alikhan Bokeikhan University»,научныйсотрудник</text:span></text:span></text:p>
            <text:p text:style-name="Standard"><text:line-break/><text:span text:style-name="T3"/></text:p>
          </table:table-cell>
        </table:table-row>
        <table:table-row>
          <table:table-cell table:style-name="Таблица1.A1" office:value-type="string">
            <text:p text:style-name="P15">6. <text:span text:style-name="Source_20_Text"><text:span text:style-name="T1">member4.png </text:span></text:span></text:p>
          </table:table-cell>
          <table:table-cell table:style-name="Таблица1.A1" office:value-type="string">
            <text:p text:style-name="P17">Темиржанова Арай Ермековна.<text:line-break/></text:p>
            <text:p text:style-name="P17">Магистр экологии </text:p>
            <text:p text:style-name="P17"/>
            <text:h text:style-name="P1" text:outline-level="3">Роль в проекте</text:h>
            <text:p text:style-name="P23">Исполнитель. Осуществление организации выездных работ по изучению перемещения трития в воде реки Шаган, в атмосферном воздушном бассейне, а также в продукции растениеводства и животноводства. Подготовка отчетной документации и материалов для публикаций.</text:p>
            <text:p text:style-name="P17"/>
            <text:p text:style-name="P16"/>
          </table:table-cell>
          <table:table-cell table:style-name="Таблица1.A1" office:value-type="string">
            <text:p text:style-name="P11"><text:span text:style-name="T2">Темиржанова А.Е. обладает 14-летним стажем в исследовании миграции тяжелых металлов и радионуклидов в окружающей среде. Её основной вид деятельности включает в себя анализ проб объектов окружающей среды с применением методов масс-спектрометрии и атомно-эмиссионной спектрометрии с индуктивно связанной плазмой. Темиржанова занимается проведением расчетов по внутрилабораторному контролю качества, оценкой неопределенности, а также межлабораторными сличениями. </text:span><text:span text:style-name="T4">Активно участвует в разработке и оптимизации методов пробоподготовки и анализа для элементного состава компонентов природы. Темиржанова А.Е. также занимается оформлением технической документации, включая отчеты, протоколы, технические справки для МОН РК и МНТЦ (МОН РК 5032/ГФ4 и МНТЦ К-2160 и К-2161, а также различные ПЦФ) и коммерческих научно-технических проектов. Кроме того, она является автором и соавтором более 10 научных статей. </text:span></text:p>
            <text:p text:style-name="P11"><text:span text:style-name="T2"/></text:p>
            <text:p text:style-name="P21"><text:span text:style-name="T19">НАО "Университет имени Шакарима Города Семей", научный сотрудник</text:span><text:span text:style-name="T1"> </text:span></text:p>
          </table:table-cell>
        </table:table-row>
        <table:table-row>
          <table:table-cell table:style-name="Таблица1.A1" office:value-type="string">
            <text:p text:style-name="P15">7. <text:span text:style-name="Source_20_Text"><text:span text:style-name="T1">member8.png</text:span></text:span> </text:p>
          </table:table-cell>
          <table:table-cell table:style-name="Таблица1.A1" office:value-type="string">
            <text:p text:style-name="P14"><text:span text:style-name="T15">Hegedűs Miklós (Хегедюш Миклош)</text:span><text:span text:style-name="T2"> <text:s text:c="3"/></text:span></text:p>
            <text:p text:style-name="P14"><text:span text:style-name="T15">PhD в области био-, экологической и химической инженерии</text:span><text:span text:style-name="T30"> </text:span></text:p>
            <text:p text:style-name="P14"><text:span text:style-name="Strong_20_Emphasis"><text:span text:style-name="T13">Роль в проекте</text:span></text:span><text:span text:style-name="T30"><text:line-break/></text:span><text:span text:style-name="T14">Исполнитель,</text:span><text:span text:style-name="T30"><text:line-break/></text:span><text:span text:style-name="T14">Научный консультант, методическое обеспечение аналитических исследований.</text:span><text:span text:style-name="T30"> </text:span></text:p>
          </table:table-cell>
          <table:table-cell table:style-name="Таблица1.A1" office:value-type="string">
            <text:p text:style-name="P21"><text:span text:style-name="T9">Hegedűs Miklós обладает 15-летним опытом работы в области радиоэкологии и радиационной безопасности. Его экспертиза включает гамма-спектрометрию, исследование радона и тория, анализ радионуклидов, изучение радиоактивности окружающей среды, радиационную защиту и обнаружение радиации. Hegedűs Miklós проявил себя как высококвалифицированный эксперт с превосходными навыками в анализе. Его участие направлено на обеспечение высокого качества анализа текущего радиоэкологического состояния окружающей среды в зоне воздействия реки Шаган, а также на разработку эффективных рекомендаций по смягчению негативных последствий воздействия радиоактивных элементов на экосистему и население.</text:span><text:span text:style-name="T1"><text:line-break/></text:span><text:span text:style-name="T9">Имеет более 30 публикациями в высокорейтинговых журналах, а также индекс Хирша-8.</text:span><text:span text:style-name="T1"> </text:span></text:p>
          </table:table-cell>
        </table:table-row>
        <table:table-row>
          <table:table-cell table:style-name="Таблица1.A1" office:value-type="string">
            <text:p text:style-name="P15">8. <text:span text:style-name="Source_20_Text"><text:span text:style-name="T1">member1.png</text:span></text:span></text:p>
          </table:table-cell>
          <table:table-cell table:style-name="Таблица1.A1" office:value-type="string">
            <text:p text:style-name="P4">Федунова Екатерина Валерьевна. Бакалавр</text:p>
            <text:p text:style-name="P7">Лаборант-исследователь, НИЦ "Курчатовский институт" - ВНИИРАЭ</text:p>
            <text:p text:style-name="P16"><text:span text:style-name="Strong_20_Emphasis"><text:span text:style-name="T16">Роль в проекте</text:span></text:span><text:span text:style-name="T34"><text:line-break/></text:span><text:span text:style-name="T16">Отбор проб растительности, проведение работ по пробоподготовке и определению трития в полученных пробах</text:span><text:span text:style-name="T34"> </text:span></text:p>
          </table:table-cell>
          <table:table-cell table:style-name="Таблица1.A1" office:value-type="string">
            <text:p text:style-name="P8"><text:span text:style-name="T1">Лаборант-исследователь, НИЦ "Курчатовский институт" </text:span></text:p>
            <text:p text:style-name="P8"><text:span text:style-name="T1">- ВНИИРАЭ</text:span></text:p>
            <text:p text:style-name="P10"><text:span text:style-name="T24">Researcher ID: ODN-0546-2025<text:line-break/>ORCID: 0009-0001-9792-1425<text:line-break/><text:line-break/></text:span><text:span text:style-name="Strong_20_Emphasis"><text:span text:style-name="T25">Роль в проекте</text:span></text:span><text:span text:style-name="T24"><text:line-break/>Отбор проб растительности, проведение работ по пробоподготовке и определению трития в</text:span><text:span text:style-name="T22"> </text:span><text:span text:style-name="T24">полученных пробах</text:span></text:p>
            <text:p text:style-name="P21"><text:span text:style-name="T1"/></text:p>
          </table:table-cell>
        </table:table-row>
        <table:table-row>
          <table:table-cell table:style-name="Таблица1.A1" office:value-type="string">
            <text:p text:style-name="P15"/>
            <text:p text:style-name="P15"/>
            <text:p text:style-name="P15"><text:soft-page-break/>9. <text:span text:style-name="Source_20_Text"><text:span text:style-name="T1">member6.png</text:span></text:span></text:p>
          </table:table-cell>
          <table:table-cell table:style-name="Таблица1.A1" office:value-type="string">
            <text:p text:style-name="P4"/>
            <text:p text:style-name="P4">Михайлов Андрей Вячеславович. Аспирант</text:p>
            <text:p text:style-name="P7"><text:soft-page-break/>Младший научный сотрудник НИЦ "Курчатовский институт" - ВНИИРАЭ</text:p>
            <text:p text:style-name="P16"><text:span text:style-name="Strong_20_Emphasis"><text:span text:style-name="T8">Роль в проекте</text:span></text:span><text:line-break/><text:span text:style-name="T9">Проведение круглосуточного отбора проб растительности, почвы, воды, проб водяных паров воздуха в полевых условиях, отчётность</text:span><text:line-break/><text:span text:style-name="T9">Обоснование участия: аспирант очной формы обучения, тематика диссертационной работы: "Исследование распределения трития в растительном покрове, произрастающей на территории с подземным источником трития"</text:span> </text:p>
          </table:table-cell>
          <table:table-cell table:style-name="Таблица1.A1" office:value-type="string">
            <text:p text:style-name="P9"><text:span text:style-name="T1"/></text:p>
            <text:p text:style-name="P9"><text:span text:style-name="T1"/></text:p>
            <text:p text:style-name="P9"><text:soft-page-break/><text:span text:style-name="T1">Младший научный сотрудник НИЦ "Курчатовский институт" - ВНИИРАЭ</text:span></text:p>
            <text:p text:style-name="P10"><text:span text:style-name="T24">Индекс Хирша: 1<text:line-break/>ORCID: 0009-0005-5859-6606<text:line-break/>ResearcherID: 83832<text:line-break/>Scopus Author ID: 58749536000<text:line-break/><text:line-break/></text:span><text:span text:style-name="Strong_20_Emphasis"><text:span text:style-name="T25">Роль в проекте</text:span></text:span><text:span text:style-name="T24"><text:line-break/>Проведение круглосуточного отбора проб растительности, почвы, воды, проб водяных паров воздуха в полевых условиях, отчётность<text:line-break/>Обоснование участия: аспирант очной формы обучения, тематика диссертационной работы: "Исследование распределения трития в растительном покрове, произрастающей на территории с подземным источником трития"</text:span></text:p>
            <text:p text:style-name="P21"><text:span text:style-name="T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ldaSans" svg:font-family="TildaSans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4T14:42:32.527000000</meta:creation-date>
    <dc:date>2026-06-04T16:29:39.638000000</dc:date>
    <meta:editing-duration>PT1M29S</meta:editing-duration>
    <meta:editing-cycles>1</meta:editing-cycles>
    <meta:document-statistic meta:table-count="1" meta:image-count="0" meta:object-count="0" meta:page-count="3" meta:paragraph-count="58" meta:word-count="933" meta:character-count="7917" meta:non-whitespace-character-count="6978"/>
    <meta:generator>LibreOffice/24.2.5.2$Windows_X86_64 LibreOffice_project/bffef4ea93e59bebbeaf7f431bb02b1a39ee8a59</meta:generator>
  </office:meta>
</office:document-meta>
</file>